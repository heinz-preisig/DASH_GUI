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B0000043B953FB1819BAE64F4.png" manifest:media-type="image/png"/>
  <manifest:file-entry manifest:full-path="Pictures/10000201000000F2000000459136B3911476AD7E.png" manifest:media-type="image/png"/>
  <manifest:file-entry manifest:full-path="Pictures/10000000000000B80000005DDE40C9AD1F0ED538.png" manifest:media-type="image/png"/>
  <manifest:file-entry manifest:full-path="Pictures/10000201000000400000001B9B35D45F292993A9.png" manifest:media-type="image/png"/>
  <manifest:file-entry manifest:full-path="Pictures/100002010000009D0000007D7E6E13E4A7C98284.png" manifest:media-type="image/png"/>
  <manifest:file-entry manifest:full-path="Pictures/1000020100000800000007C3040A0968B22380C5.png" manifest:media-type="image/png"/>
  <manifest:file-entry manifest:full-path="Pictures/100002010000007A0000007AA68FDC3691569C49.png" manifest:media-type="image/png"/>
  <manifest:file-entry manifest:full-path="Pictures/100002010000013B00000066C433172FB63FACE4.png" manifest:media-type="image/png"/>
  <manifest:file-entry manifest:full-path="Pictures/10000201000001990000006668F2069BF5745EE2.png" manifest:media-type="image/png"/>
  <manifest:file-entry manifest:full-path="Pictures/10000000000000AD00000073D3F11BE981A910BB.jpg" manifest:media-type="image/jpeg"/>
  <manifest:file-entry manifest:full-path="Pictures/100000000000010D0000005644B16388C6F3C66B.jpg" manifest:media-type="image/jpeg"/>
  <manifest:file-entry manifest:full-path="Pictures/1000000000000108000000CF40EBC1BA1A4390A6.jpg" manifest:media-type="image/jpeg"/>
  <manifest:file-entry manifest:full-path="Pictures/10000201000008000000001964EFD5A4EC2115B9.png" manifest:media-type="image/png"/>
  <manifest:file-entry manifest:full-path="Pictures/100000000000018F0000007EB256D04E04D8F09D.png" manifest:media-type="image/png"/>
  <manifest:file-entry manifest:full-path="Pictures/1000020100000800000007C3CEA84849522B5B71.png" manifest:media-type="image/png"/>
  <manifest:file-entry manifest:full-path="Pictures/10000201000006910000013FE11B979C2D5E5ABC.png" manifest:media-type="image/png"/>
  <manifest:file-entry manifest:full-path="Pictures/10000201000008000000017A75271B0873270BF8.png" manifest:media-type="image/png"/>
  <manifest:file-entry manifest:full-path="Pictures/100002010000064400000260E06921D993B07D34.png" manifest:media-type="image/png"/>
  <manifest:file-entry manifest:full-path="Pictures/100000000000008F00000023D79789B318A707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urier New" svg:font-family="'Courier New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26db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bf1b1b" draw:stroke-linejoin="round" draw:fill="solid" draw:fill-color="#ffede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53cm" svg:stroke-color="#167a40" draw:stroke-linejoin="round" draw:fill="solid" draw:fill-color="#edfff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35cm" svg:stroke-color="#026db0" draw:stroke-linejoin="round" draw:fill="solid" draw:fill-color="#f0f4f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53cm" svg:stroke-color="#026db0" draw:stroke-linejoin="round" draw:fill="solid" draw:fill-color="#e8f4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solid" draw:fill-color="#ecf4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solid" draw:fill-color="#026db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53cm" svg:stroke-color="#334455" draw:stroke-linejoin="round" draw:fill="solid" draw:fill-color="#f5f8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53cm" svg:stroke-color="#026db0" draw:stroke-linejoin="round" draw:fill="solid" draw:fill-color="#f5f8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53cm" svg:stroke-color="#167a40" draw:stroke-linejoin="round" draw:fill="solid" draw:fill-color="#f5f8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53cm" svg:stroke-color="#925e00" draw:stroke-linejoin="round" draw:fill="solid" draw:fill-color="#f5f8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925e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CUSTOM_5f_7-title">
      <style:graphic-properties draw:stroke="none" svg:stroke-width="0cm" draw:fill="solid" draw:fill-color="#ffffff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" style:family="presentation" style:parent-style-name="CUSTOM_5f_7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3" style:family="presentation" style:parent-style-name="CUSTOM_5f_7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CUSTOM_5f_6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9" style:family="presentation" style:parent-style-name="CUSTOM_5f_6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6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CUSTOM_5f_6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12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6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24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26db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7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eded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dfff3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loext:graphic-properties draw:fill="solid" draw:fill-color="#f0f4f8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8f4f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cf4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5f8ff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925e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26db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2" style:family="text">
      <style:text-properties fo:font-variant="normal" fo:text-transform="none" fo:color="#334455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" style:family="text">
      <style:text-properties fo:font-variant="normal" fo:text-transform="none" fo:color="#925e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4" style:family="text">
      <style:text-properties fo:font-variant="normal" fo:text-transform="none" fo:color="#e97132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2e8c07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1a1a2e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0" style:family="text">
      <style:text-properties fo:font-variant="normal" fo:text-transform="none" fo:color="#bf1b1b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334455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2" style:family="text">
      <style:text-properties fo:font-variant="normal" fo:text-transform="none" fo:color="#167a4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3" style:family="text">
      <style:text-properties fo:font-variant="normal" fo:text-transform="none" fo:color="#38bdf8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4" style:family="text">
      <style:text-properties fo:font-variant="normal" fo:text-transform="none" fo:color="#024a7a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5" style:family="text">
      <style:text-properties fo:font-variant="normal" fo:text-transform="none" fo:color="#024a7a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16" style:family="text">
      <style:text-properties fo:font-variant="normal" fo:text-transform="none" fo:color="#925e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" style:family="text">
      <style:text-properties fo:font-variant="normal" fo:text-transform="none" fo:color="#334455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8" style:family="text">
      <style:text-properties fo:font-variant="normal" fo:text-transform="none" fo:color="#026db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9" style:family="text">
      <style:text-properties fo:font-variant="normal" fo:text-transform="none" fo:color="#334455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fo:font-variant="normal" fo:text-transform="none" fo:color="#925e0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21" style:family="text">
      <style:text-properties fo:font-variant="normal" fo:text-transform="none" fo:color="#026db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2" style:family="text">
      <style:text-properties fo:font-variant="normal" fo:text-transform="none" fo:color="#334455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3" style:family="text">
      <style:text-properties fo:font-variant="normal" fo:text-transform="none" fo:color="#925e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4" style:family="text">
      <style:text-properties fo:font-variant="normal" fo:text-transform="none" fo:color="#024a7a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25" style:family="text">
      <style:text-properties fo:font-variant="normal" fo:text-transform="none" fo:color="#026db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26" style:family="text">
      <style:text-properties fo:font-variant="normal" fo:text-transform="none" fo:color="#026db0" style:text-line-through-style="none" style:text-line-through-type="none" style:text-position="0% 100%" style:font-name="Calibri" fo:font-size="17pt" fo:letter-spacing="normal" fo:font-style="normal" style:text-underline-style="none" fo:font-weight="bold" style:font-name-asian="Calibri" style:font-size-asian="17pt" style:font-style-asian="normal" style:font-weight-asian="bold" style:font-name-complex="Calibri" style:font-size-complex="17pt" style:font-style-complex="normal" style:font-weight-complex="bold"/>
    </style:style>
    <style:style style:name="T27" style:family="text">
      <style:text-properties fo:font-variant="normal" fo:text-transform="none" fo:color="#024a7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29" style:family="text">
      <style:text-properties fo:font-variant="normal" fo:text-transform="none" fo:color="#1a1a2e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0" style:family="text">
      <style:text-properties fo:font-variant="normal" fo:text-transform="none" fo:color="#026db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1" style:family="text">
      <style:text-properties fo:font-variant="normal" fo:text-transform="none" fo:color="#167a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2" style:family="text">
      <style:text-properties fo:font-variant="normal" fo:text-transform="none" fo:color="#334455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33" style:family="text">
      <style:text-properties fo:font-variant="normal" fo:text-transform="none" fo:color="#334455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4" style:family="text">
      <style:text-properties fo:font-variant="normal" fo:text-transform="none" fo:color="#026db0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35" style:family="text">
      <style:text-properties fo:font-variant="normal" fo:text-transform="none" fo:color="#167a40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36" style:family="text">
      <style:text-properties fo:font-variant="normal" fo:text-transform="none" fo:color="#925e00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37" style:family="text">
      <style:text-properties fo:font-variant="normal" fo:text-transform="none" fo:color="#026db0" style:text-line-through-style="none" style:text-line-through-type="none" style:text-position="0% 100%" style:font-name="Calibri" fo:font-size="27pt" fo:letter-spacing="normal" fo:font-style="normal" style:text-underline-style="none" fo:font-weight="bold" style:font-name-asian="Calibri" style:font-size-asian="27pt" style:font-style-asian="normal" style:font-weight-asian="bold" style:font-name-complex="Calibri" style:font-size-complex="27pt" style:font-style-complex="normal" style:font-weight-complex="bold"/>
    </style:style>
    <style:style style:name="T38" style:family="text">
      <style:text-properties fo:font-variant="normal" fo:text-transform="none" fo:color="#334455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39" style:family="text">
      <style:text-properties fo:font-variant="normal" fo:text-transform="none" fo:color="#bf1b1b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40" style:family="text">
      <style:text-properties fo:font-variant="normal" fo:text-transform="none" fo:color="#167a4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41" style:family="text">
      <style:text-properties fo:font-variant="normal" fo:text-transform="none" fo:color="#026db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2" style:family="text">
      <style:text-properties fo:font-variant="normal" fo:text-transform="none" fo:color="#334455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4" style:family="text">
      <style:text-properties fo:font-variant="normal" fo:text-transform="none" fo:color="#3c78d8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5" style:family="text">
      <style:text-properties fo:font-variant="normal" fo:text-transform="none" fo:color="#1a1a2e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6" style:family="text">
      <style:text-properties fo:font-variant="normal" fo:text-transform="none" fo:color="#925e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47" style:family="text">
      <style:text-properties fo:font-variant="normal" fo:text-transform="none" fo:color="#334455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971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e8c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8bdf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m Bricks to Forms" draw:style-name="dp1" draw:master-page-name="CUSTOM_5f_7">
        <draw:custom-shape draw:name="Google Shape;130;p19" draw:style-name="gr1" draw:text-style-name="P1" draw:layer="layout" svg:width="0.456cm" svg:height="19.049cm" svg:x="0cm" svg:y="0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2" draw:text-style-name="P3" draw:layer="layout" svg:width="17.842cm" svg:height="1.355cm" svg:x="15.56cm" svg:y="10.951cm">
          <text:p text:style-name="P2"><text:span text:style-name="T1">Building Digital Product Passports with SHA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9" draw:style-name="gr2" draw:text-style-name="P3" draw:layer="layout" svg:width="12.05cm" svg:height="1.102cm" svg:x="15.56cm" svg:y="12.703cm">
          <text:p text:style-name="P2"><text:span text:style-name="T2">A visual approach to structu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2" draw:text-style-name="P3" draw:layer="layout" svg:width="8.668cm" svg:height="0.931cm" svg:x="15.56cm" svg:y="14.337cm">
          <text:p text:style-name="P2"><text:span text:style-name="T3">No coding background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9" presentation:style-name="pr1" draw:text-style-name="P5" draw:layer="layout" svg:width="31.587cm" svg:height="2.504cm" svg:x="0.649cm" svg:y="7.63cm" presentation:class="title" presentation:user-transformed="true">
          <draw:text-box>
            <text:p text:style-name="P4"><text:span text:style-name="T4">From Bricks to Forms</text:span></text:p>
          </draw:text-box>
        </draw:frame>
        <draw:frame draw:name="Google Shape;135;p19" presentation:style-name="pr2" draw:text-style-name="P7" draw:layer="layout" svg:width="2.031cm" svg:height="1.457cm" svg:x="31.684cm" svg:y="17.592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27;p1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frame draw:name="Google Shape;140;p20" presentation:style-name="pr4" draw:text-style-name="P10" draw:layer="layout" svg:width="25.104cm" svg:height="6.963cm" svg:x="3.636cm" svg:y="2.995cm" presentation:class="title" presentation:user-transformed="true">
          <draw:text-box>
            <text:p text:style-name="P9"><text:span text:style-name="T6">Heinz A. Preisig</text:span><text:span text:style-name="T6"><text:line-break/></text:span><text:span text:style-name="T6">Process Systems Engineering</text:span><text:span text:style-name="T6"><text:line-break/></text:span><text:span text:style-name="T6">NTNU, Trondheim</text:span><text:span text:style-name="T6"><text:line-break/></text:span><text:span text:style-name="T6">Norway</text:span></text:p>
          </draw:text-box>
        </draw:frame>
        <draw:frame draw:name="Google Shape;141;p20" draw:style-name="gr4" draw:text-style-name="P11" draw:layer="layout" svg:width="6.445cm" svg:height="1.189cm" svg:x="25.392cm" svg:y="16.465cm">
          <draw:image xlink:href="Pictures/10000201000008000000017A75271B0873270BF8.png" xlink:type="simple" xlink:show="embed" xlink:actuate="onLoad">
            <text:p/>
          </draw:image>
        </draw:frame>
        <draw:frame draw:name="Google Shape;142;p20" presentation:style-name="pr5" draw:text-style-name="P13" draw:layer="layout" svg:width="2.031cm" svg:height="1.457cm" svg:x="32.164cm" svg:y="17.7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Google Shape;143;p20" draw:style-name="gr4" draw:text-style-name="P11" draw:layer="layout" svg:width="5.195cm" svg:height="5.195cm" svg:x="13.571cm" svg:y="10.708cm">
          <draw:image xlink:href="Pictures/100000000000043B0000043B953FB1819BAE64F4.png" xlink:type="simple" xlink:show="embed" xlink:actuate="onLoad">
            <text:p/>
          </draw:image>
        </draw:frame>
        <draw:custom-shape draw:name="Google Shape;144;p20" draw:style-name="gr5" draw:text-style-name="P15" draw:layer="layout" svg:width="5.289cm" svg:height="1.525cm" svg:x="13.228cm" svg:y="16.116cm">
          <text:p text:style-name="P14"><text:span text:style-name="T8">e-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3ed852be8a7_0_244:notes" draw:style-name="gr3" draw:layer="layout" svg:width="12.7cm" svg:height="9.524cm" svg:x="3.176cm" svg:y="1.905cm" draw:page-number="2" presentation:class="page"/>
          <draw:frame draw:name="Google Shape;138;g3ed852be8a7_0_244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CUSTOM_5f_6">
        <draw:custom-shape draw:name="Google Shape;149;p21" draw:style-name="gr6" draw:text-style-name="P15" draw:layer="layout" svg:width="30.479cm" svg:height="1.779cm" svg:x="1.689cm" svg:y="3.365cm">
          <text:p text:style-name="P2"><text:span text:style-name="T9">Digital Product Passports Are 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7" draw:text-style-name="P16" draw:layer="layout" svg:width="14.731cm" svg:height="11.175cm" svg:x="1.793cm" svg:y="5.732cm">
          <text:p text:style-name="P14"><text:span text:style-name="T10">❌ <text:s/></text:span><text:span text:style-name="T10">TODAY</text:span></text:p>
          <text:p text:style-name="P2"><text:span text:style-name="T11">• </text:span><text:span text:style-name="T11">Company A says: 'weight: 5kg'</text:span></text:p>
          <text:p text:style-name="P2"><text:span text:style-name="T11">• </text:span><text:span text:style-name="T11">Company B says: 'mass: 5000g'</text:span></text:p>
          <text:p text:style-name="P2"><text:span text:style-name="T11">• </text:span><text:span text:style-name="T11">Company C says: '5' <text:s/>(just a number!)</text:span></text:p>
          <text:p text:style-name="P2"><text:span text:style-name="T11"/></text:p>
          <text:p text:style-name="P2"><text:span text:style-name="T11">→ </text:span><text:span text:style-name="T11">Computers can't understand this</text:span></text:p>
          <text:p text:style-name="P2"><text:span text:style-name="T11">→ </text:span><text:span text:style-name="T11">Manual data entry &amp; errors</text:span></text:p>
          <text:p text:style-name="P2"><text:span text:style-name="T11">→ </text:span><text:span text:style-name="T11">Compliance head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1" draw:style-name="gr8" draw:text-style-name="P17" draw:layer="layout" svg:width="14.731cm" svg:height="11.175cm" svg:x="17.333cm" svg:y="5.732cm">
          <text:p text:style-name="P14"><text:span text:style-name="T12">✓ <text:s/></text:span><text:span text:style-name="T12">WITH SHACL</text:span></text:p>
          <text:p text:style-name="P2"><text:span text:style-name="T11">• </text:span><text:span text:style-name="T11">Product.weight = 5</text:span></text:p>
          <text:p text:style-name="P2"><text:span text:style-name="T11">• </text:span><text:span text:style-name="T11">Must be a number</text:span></text:p>
          <text:p text:style-name="P2"><text:span text:style-name="T11">• </text:span><text:span text:style-name="T11">Must have a unit</text:span></text:p>
          <text:p text:style-name="P2"><text:span text:style-name="T11">• </text:span><text:span text:style-name="T11">Unit can only be: kg, g, lb, oz</text:span></text:p>
          <text:p text:style-name="P2"><text:span text:style-name="T11"/></text:p>
          <text:p text:style-name="P2"><text:span text:style-name="T11">→ </text:span><text:span text:style-name="T11">Machines can validate it</text:span></text:p>
          <text:p text:style-name="P2"><text:span text:style-name="T11">→ </text:span><text:span text:style-name="T11">Forms guide data entry</text:span></text:p>
          <text:p text:style-name="P2"><text:span text:style-name="T11">→ </text:span><text:span text:style-name="T11">Always con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1" presentation:style-name="pr7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The Problem</text:span></text:p>
          </draw:text-box>
        </draw:frame>
        <draw:frame draw:name="Google Shape;153;p21" presentation:style-name="pr8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146;p2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2:notes" draw:style-name="gr3" draw:layer="layout" svg:width="12.7cm" svg:height="9.524cm" svg:x="3.176cm" svg:y="1.905cm" draw:page-number="3" presentation:class="page"/>
        </presentation:notes>
      </draw:page>
      <draw:page draw:name="The Vision" draw:style-name="dp1" draw:master-page-name="CUSTOM_5f_6_5f_1">
        <draw:custom-shape draw:name="Google Shape;158;p22" draw:style-name="gr6" draw:text-style-name="P15" draw:layer="layout" svg:width="30.479cm" svg:height="1.779cm" svg:x="1.689cm" svg:y="3.143cm">
          <text:p text:style-name="P2"><text:span text:style-name="T9">What If Data Had Gramm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6" draw:text-style-name="P15" draw:layer="layout" svg:width="30.479cm" svg:height="1.102cm" svg:x="1.689cm" svg:y="5.81cm">
          <text:p text:style-name="P2"><text:span text:style-name="T2">Like grammar rules in language, data needs rules to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9" draw:text-style-name="P19" draw:layer="layout" svg:width="29.463cm" svg:height="1.904cm" svg:x="2.451cm" svg:y="7.842cm">
          <text:p text:style-name="P2"><text:span text:style-name="T14">❌ <text:s/></text:span><text:span text:style-name="T14">"The product weighs about 5kg usually" <text:s text:c="2"/>(ambiguou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9" draw:text-style-name="P19" draw:layer="layout" svg:width="29.463cm" svg:height="5.333cm" svg:x="2.451cm" svg:y="10.382cm">
          <text:p text:style-name="P2"><text:span text:style-name="T15">✓ <text:s text:c="2"/></text:span><text:span text:style-name="T15">Product.weight <text:s/>= <text:s/>5</text:span></text:p>
          <text:p text:style-name="P2"><text:span text:style-name="T15"><text:s text:c="9"/></text:span><text:span text:style-name="T15">type <text:s/>→ <text:s/>number</text:span></text:p>
          <text:p text:style-name="P2"><text:span text:style-name="T15"><text:s text:c="9"/></text:span><text:span text:style-name="T15">unit <text:s/>→ <text:s/>kg <text:s/>(or g, lb, oz)</text:span></text:p>
          <text:p text:style-name="P2"><text:span text:style-name="T15"><text:s text:c="5"/></text:span><text:span text:style-name="T15">required <text:s/>→ <text:s/>yes</text:span></text:p>
          <text:p text:style-name="P2"><text:span text:style-name="T15"><text:s text:c="6"/></text:span><text:span text:style-name="T15">checked <text:s/>→ <text:s/>automatic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6" draw:text-style-name="P15" draw:layer="layout" svg:width="30.479cm" svg:height="1.017cm" svg:x="1.689cm" svg:y="16.478cm">
          <text:p text:style-name="P2"><text:span text:style-name="T16">SHACL is the W3C standard for writing these ru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2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The Vision</text:span></text:p>
          </draw:text-box>
        </draw:frame>
        <draw:frame draw:name="Google Shape;164;p22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155;p3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3:notes" draw:style-name="gr3" draw:layer="layout" svg:width="12.7cm" svg:height="9.524cm" svg:x="3.176cm" svg:y="1.905cm" draw:page-number="4" presentation:class="page"/>
        </presentation:notes>
      </draw:page>
      <draw:page draw:name="The Brick Idea" draw:style-name="dp1" draw:master-page-name="CUSTOM_5f_6_5f_1">
        <draw:custom-shape draw:name="Google Shape;169;p23" draw:style-name="gr6" draw:text-style-name="P15" draw:layer="layout" svg:width="30.479cm" svg:height="1.779cm" svg:x="1.016cm" svg:y="3.446cm">
          <text:p text:style-name="P2"><text:span text:style-name="T9">Lego Bricks for Data Sch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6" draw:text-style-name="P15" draw:layer="layout" svg:width="31.749cm" svg:height="1.059cm" svg:x="1.016cm" svg:y="5.986cm">
          <text:p text:style-name="P2"><text:span text:style-name="T17">Instead of writing rules from scratch every time → create reusable bricks once, snap them togeth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3" draw:style-name="gr10" draw:text-style-name="P20" draw:layer="layout" svg:width="7.619cm" svg:height="7.433cm" svg:x="0.889cm" svg:y="7.881cm">
          <text:p text:style-name="P14"><text:span text:style-name="T18">🧱 <text:s/></text:span><text:span text:style-name="T18">Mass</text:span></text:p>
          <text:p text:style-name="P2"><text:span text:style-name="T18"/></text:p>
          <text:p text:style-name="P14"><text:span text:style-name="T19">number + unit</text:span><text:span text:style-name="T19"><text:line-break/></text:span><text:span text:style-name="T19">(kg, g, lb, oz, mg, t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23" draw:style-name="gr10" draw:text-style-name="P20" draw:layer="layout" svg:width="7.619cm" svg:height="7.433cm" svg:x="9.017cm" svg:y="7.881cm">
          <text:p text:style-name="P14"><text:span text:style-name="T18">🌡 <text:s/></text:span><text:span text:style-name="T18">Temperature</text:span></text:p>
          <text:p text:style-name="P2"><text:span text:style-name="T18"/></text:p>
          <text:p text:style-name="P14"><text:span text:style-name="T19">number + degrees</text:span><text:span text:style-name="T19"><text:line-break/></text:span><text:span text:style-name="T19">(°C, °F, K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23" draw:style-name="gr10" draw:text-style-name="P20" draw:layer="layout" svg:width="7.619cm" svg:height="7.433cm" svg:x="17.145cm" svg:y="7.881cm">
          <text:p text:style-name="P14"><text:span text:style-name="T18">⚡ <text:s/></text:span><text:span text:style-name="T18">Battery Cap</text:span></text:p>
          <text:p text:style-name="P2"><text:span text:style-name="T18"/></text:p>
          <text:p text:style-name="P14"><text:span text:style-name="T19">number + unit</text:span><text:span text:style-name="T19"><text:line-break/></text:span><text:span text:style-name="T19">(Ah, mAh, Coulombs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23" draw:style-name="gr10" draw:text-style-name="P20" draw:layer="layout" svg:width="7.619cm" svg:height="7.433cm" svg:x="25.273cm" svg:y="7.881cm">
          <text:p text:style-name="P14"><text:span text:style-name="T18">🏭 <text:s/></text:span><text:span text:style-name="T18">Manufacturer</text:span></text:p>
          <text:p text:style-name="P2"><text:span text:style-name="T18"/></text:p>
          <text:p text:style-name="P14"><text:span text:style-name="T19">name + ID + country</text:span><text:span text:style-name="T19"><text:line-break/></text:span><text:span text:style-name="T19">(linked data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23" draw:style-name="gr6" draw:text-style-name="P15" draw:layer="layout" svg:width="31.749cm" svg:height="0.975cm" svg:x="1.016cm" svg:y="16.142cm">
          <text:p text:style-name="P2"><text:span text:style-name="T20">Define once → reuse across every product schema in your organis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3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The Brick Idea</text:span></text:p>
          </draw:text-box>
        </draw:frame>
        <draw:frame draw:name="Google Shape;177;p23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166;p4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p4:notes" draw:style-name="gr3" draw:layer="layout" svg:width="12.7cm" svg:height="9.524cm" svg:x="3.176cm" svg:y="1.905cm" draw:page-number="5" presentation:class="page"/>
        </presentation:notes>
      </draw:page>
      <draw:page draw:name="The Brick Editor" draw:style-name="dp1" draw:master-page-name="CUSTOM_5f_6_5f_1">
        <draw:custom-shape draw:name="Google Shape;182;p24" draw:style-name="gr6" draw:text-style-name="P15" draw:layer="layout" svg:width="30.479cm" svg:height="1.779cm" svg:x="0.906cm" svg:y="3.239cm">
          <text:p text:style-name="P2"><text:span text:style-name="T9">Creating a Reusable Br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4" draw:style-name="gr6" draw:text-style-name="P15" draw:layer="layout" svg:width="15.239cm" svg:height="1.059cm" svg:x="0.906cm" svg:y="5.779cm">
          <text:p text:style-name="P2"><text:span text:style-name="T17">Point-and-click — no coding neede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11" draw:text-style-name="P21" draw:layer="layout" svg:width="18.154cm" svg:height="1.396cm" svg:x="0.906cm" svg:y="7.585cm">
          <text:p text:style-name="P2"><text:span text:style-name="T21">Name <text:s text:c="7"/></text:span><text:span text:style-name="T22">BatteryCapa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4" draw:style-name="gr11" draw:text-style-name="P21" draw:layer="layout" svg:width="18.154cm" svg:height="1.396cm" svg:x="0.906cm" svg:y="9.159cm">
          <text:p text:style-name="P2"><text:span text:style-name="T21">Path <text:s text:c="7"/></text:span><text:span text:style-name="T22">ex:batteryCapa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11" draw:text-style-name="P21" draw:layer="layout" svg:width="18.154cm" svg:height="1.396cm" svg:x="0.906cm" svg:y="10.734cm">
          <text:p text:style-name="P2"><text:span text:style-name="T21">Datatype <text:s text:c="3"/></text:span><text:span text:style-name="T22">xsd:de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4" draw:style-name="gr11" draw:text-style-name="P21" draw:layer="layout" svg:width="18.154cm" svg:height="1.396cm" svg:x="0.906cm" svg:y="12.309cm">
          <text:p text:style-name="P2"><text:span text:style-name="T21">Class <text:s text:c="6"/></text:span><text:span text:style-name="T22">qudt:ElectricCharge <text:s text:c="2"/>← triggers magic 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6" draw:text-style-name="P15" draw:layer="layout" svg:width="5.079cm" svg:height="1.017cm" svg:x="21.448cm" svg:y="6.559cm">
          <text:p text:style-name="P2"><text:span text:style-name="T23">Result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4" draw:style-name="gr9" draw:text-style-name="P19" draw:layer="layout" svg:width="11.208cm" svg:height="7.619cm" svg:x="21.448cm" svg:y="8.192cm">
          <text:p text:style-name="P2"><text:span text:style-name="T24">Unit dropdown appears</text:span></text:p>
          <text:p text:style-name="P2"><text:span text:style-name="T24">automatically:</text:span></text:p>
          <text:p text:style-name="P2"><text:span text:style-name="T24"/></text:p>
          <text:p text:style-name="P2"><text:span text:style-name="T24"><text:s text:c="2"/>▼ <text:s/></text:span><text:span text:style-name="T24">Ampere-hour (Ah)</text:span></text:p>
          <text:p text:style-name="P2"><text:span text:style-name="T24"><text:s text:c="5"/></text:span><text:span text:style-name="T24">Milliampere-hour (mAh)</text:span></text:p>
          <text:p text:style-name="P2"><text:span text:style-name="T24"><text:s text:c="5"/></text:span><text:span text:style-name="T24">Coulomb (C)</text:span></text:p>
          <text:p text:style-name="P2"><text:span text:style-name="T24"><text:s text:c="5"/></text:span><text:span text:style-name="T24">Kiloampere-hour (kA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4" draw:style-name="gr6" draw:text-style-name="P15" draw:layer="layout" svg:width="31.749cm" svg:height="0.931cm" svg:x="1.016cm" svg:y="16.256cm">
          <text:p text:style-name="P2"><text:span text:style-name="T3">The system looks up applicable units from the QUDT ontology — no manual list need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4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The Brick Editor</text:span></text:p>
          </draw:text-box>
        </draw:frame>
        <draw:frame draw:name="Google Shape;192;p24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179;p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p5:notes" draw:style-name="gr3" draw:layer="layout" svg:width="12.7cm" svg:height="9.524cm" svg:x="3.176cm" svg:y="1.905cm" draw:page-number="6" presentation:class="page"/>
        </presentation:notes>
      </draw:page>
      <draw:page draw:name="The Schema Editor" draw:style-name="dp1" draw:master-page-name="CUSTOM_5f_6_5f_1">
        <draw:custom-shape draw:name="Google Shape;197;p25" draw:style-name="gr6" draw:text-style-name="P15" draw:layer="layout" svg:width="30.479cm" svg:height="1.779cm" svg:x="1.016cm" svg:y="3.17cm">
          <text:p text:style-name="P2"><text:span text:style-name="T9">Assembling Bricks into a Product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5" draw:style-name="gr9" draw:text-style-name="P19" draw:layer="layout" svg:width="31.749cm" svg:height="10.618cm" svg:x="1.016cm" svg:y="5.637cm">
          <text:p text:style-name="P2"><text:span text:style-name="T24">EV Battery Schema</text:span></text:p>
          <text:p text:style-name="P2"><text:span text:style-name="T24">├── </text:span><text:span text:style-name="T24">Battery Identification</text:span></text:p>
          <text:p text:style-name="P2"><text:span text:style-name="T24">│ <text:s text:c="2"/>├── </text:span><text:span text:style-name="T24">Model Number <text:s text:c="5"/>(text)</text:span></text:p>
          <text:p text:style-name="P2"><text:span text:style-name="T24">│ <text:s text:c="2"/>├── </text:span><text:span text:style-name="T24">Serial Number <text:s text:c="4"/>(text)</text:span></text:p>
          <text:p text:style-name="P2"><text:span text:style-name="T24">│ <text:s text:c="2"/>└── </text:span><text:span text:style-name="T24">Manufacturer <text:s text:c="5"/>(linked data)</text:span></text:p>
          <text:p text:style-name="P2"><text:span text:style-name="T24">├── </text:span><text:span text:style-name="T24">Physical Properties</text:span></text:p>
          <text:p text:style-name="P2"><text:span text:style-name="T24">│ <text:s text:c="2"/>├── </text:span><text:span text:style-name="T24">Mass <text:s text:c="10"/>← [Mass brick] <text:s text:c="7"/>→ unit dropdown</text:span></text:p>
          <text:p text:style-name="P2"><text:span text:style-name="T24">│ <text:s text:c="2"/>└── </text:span><text:span text:style-name="T24">Capacity <text:s text:c="6"/>← [BatteryCapacity] <text:s text:c="2"/>→ unit dropdown</text:span></text:p>
          <text:p text:style-name="P2"><text:span text:style-name="T24">└── </text:span><text:span text:style-name="T24">Environmental</text:span></text:p>
          <text:p text:style-name="P2"><text:span text:style-name="T24"><text:s text:c="4"/>├── </text:span><text:span text:style-name="T24">Carbon Footprint <text:s/>← [CO₂ brick] <text:s text:c="5"/>→ unit dropdown</text:span></text:p>
          <text:p text:style-name="P2"><text:span text:style-name="T24"><text:s text:c="4"/>└── </text:span><text:span text:style-name="T24">Recyclability <text:s text:c="4"/>← [Percent brick] <text:s/>→ %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5" draw:style-name="gr6" draw:text-style-name="P15" draw:layer="layout" svg:width="31.749cm" svg:height="0.975cm" svg:x="1.016cm" svg:y="16.764cm">
          <text:p text:style-name="P2"><text:span text:style-name="T20">Visual tree editor — drag bricks in, set connections, d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The Schema Editor</text:span></text:p>
          </draw:text-box>
        </draw:frame>
        <draw:frame draw:name="Google Shape;201;p25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194;p6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p6:notes" draw:style-name="gr3" draw:layer="layout" svg:width="12.7cm" svg:height="9.524cm" svg:x="3.176cm" svg:y="1.905cm" draw:page-number="7" presentation:class="page"/>
        </presentation:notes>
      </draw:page>
      <draw:page draw:name="One Source → Many Outputs" draw:style-name="dp1" draw:master-page-name="CUSTOM_5f_6_5f_1">
        <draw:custom-shape draw:name="Google Shape;206;p26" draw:style-name="gr6" draw:text-style-name="P15" draw:layer="layout" svg:width="30.479cm" svg:height="1.779cm" svg:x="1.118cm" svg:y="3.386cm">
          <text:p text:style-name="P2"><text:span text:style-name="T9">The Magic: One Brick, Three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6" draw:style-name="gr6" draw:text-style-name="P15" draw:layer="layout" svg:width="1.269cm" svg:height="1.524cm" svg:x="10.77cm" svg:y="11.133cm">
          <text:p text:style-name="P14"><text:span text:style-name="T2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6" draw:text-style-name="P15" draw:layer="layout" svg:width="1.269cm" svg:height="1.524cm" svg:x="21.565cm" svg:y="11.133cm">
          <text:p text:style-name="P14"><text:span text:style-name="T2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6" draw:style-name="gr6" draw:text-style-name="P15" draw:layer="layout" svg:width="10.413cm" svg:height="0.975cm" svg:x="0.864cm" svg:y="6.307cm">
          <text:p text:style-name="P14"><text:span text:style-name="T26">Brick (JS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9" draw:text-style-name="P19" draw:layer="layout" svg:width="10.54cm" svg:height="8.889cm" svg:x="0.864cm" svg:y="7.831cm">
          <text:p text:style-name="P2"><text:span text:style-name="T27">{</text:span></text:p>
          <text:p text:style-name="P2"><text:span text:style-name="T27"><text:s text:c="2"/></text:span><text:span text:style-name="T27">name: 'Mass',</text:span></text:p>
          <text:p text:style-name="P2"><text:span text:style-name="T27"><text:s text:c="2"/></text:span><text:span text:style-name="T27">datatype: xsd:decimal,</text:span></text:p>
          <text:p text:style-name="P2"><text:span text:style-name="T27"><text:s text:c="2"/></text:span><text:span text:style-name="T27">class: qudt:Mass,</text:span></text:p>
          <text:p text:style-name="P2"><text:span text:style-name="T27"><text:s text:c="2"/></text:span><text:span text:style-name="T27">units: [kg,g,lb,...]</text:span></text:p>
          <text:p text:style-name="P2"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6" draw:text-style-name="P15" draw:layer="layout" svg:width="10.413cm" svg:height="0.975cm" svg:x="11.659cm" svg:y="6.307cm">
          <text:p text:style-name="P14"><text:span text:style-name="T26">SHACL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6" draw:style-name="gr9" draw:text-style-name="P19" draw:layer="layout" svg:width="10.54cm" svg:height="8.889cm" svg:x="11.659cm" svg:y="7.831cm">
          <text:p text:style-name="P2"><text:span text:style-name="T27">sh:property [</text:span></text:p>
          <text:p text:style-name="P2"><text:span text:style-name="T27"><text:s text:c="2"/></text:span><text:span text:style-name="T27">sh:path ex:mass ;</text:span></text:p>
          <text:p text:style-name="P2"><text:span text:style-name="T27"><text:s text:c="2"/></text:span><text:span text:style-name="T27">sh:datatype xsd:decimal ;</text:span></text:p>
          <text:p text:style-name="P2"><text:span text:style-name="T27"><text:s text:c="2"/></text:span><text:span text:style-name="T27">sh:class qudt:Mass ;</text:span></text:p>
          <text:p text:style-name="P2"><text:span text:style-name="T27"><text:s text:c="2"/></text:span><text:span text:style-name="T27">sh:in (kg g lb oz) ;</text:span></text:p>
          <text:p text:style-name="P2"><text:span text:style-name="T27">]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6" draw:style-name="gr6" draw:text-style-name="P15" draw:layer="layout" svg:width="10.413cm" svg:height="0.975cm" svg:x="22.454cm" svg:y="6.307cm">
          <text:p text:style-name="P14"><text:span text:style-name="T26">User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6" draw:style-name="gr9" draw:text-style-name="P19" draw:layer="layout" svg:width="10.54cm" svg:height="8.889cm" svg:x="22.454cm" svg:y="7.831cm">
          <text:p text:style-name="P2"><text:span text:style-name="T27"><text:s text:c="2"/></text:span><text:span text:style-name="T27">Mass</text:span></text:p>
          <text:p text:style-name="P2"><text:span text:style-name="T27"><text:s text:c="2"/>┌─────────┬──────┐</text:span></text:p>
          <text:p text:style-name="P2"><text:span text:style-name="T27"><text:s text:c="2"/>│ <text:s/></text:span><text:span text:style-name="T27">5 <text:s text:c="5"/>│ ▼ kg │</text:span></text:p>
          <text:p text:style-name="P2"><text:span text:style-name="T27"><text:s text:c="2"/>└─────────┴──────┘</text:span></text:p>
          <text:p text:style-name="P2"><text:span text:style-name="T27"/></text:p>
          <text:p text:style-name="P2"><text:span text:style-name="T27"><text:s text:c="2"/></text:span><text:span text:style-name="T27">Change brick once</text:span></text:p>
          <text:p text:style-name="P2"><text:span text:style-name="T27"><text:s text:c="2"/>→ </text:span><text:span text:style-name="T27">all forms 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6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One Source → Many Outputs</text:span></text:p>
          </draw:text-box>
        </draw:frame>
        <draw:frame draw:name="Google Shape;216;p26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203;p7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4;p7:notes" draw:style-name="gr3" draw:layer="layout" svg:width="12.7cm" svg:height="9.524cm" svg:x="3.176cm" svg:y="1.905cm" draw:page-number="8" presentation:class="page"/>
        </presentation:notes>
      </draw:page>
      <draw:page draw:name="Enrichment Engine" draw:style-name="dp1" draw:master-page-name="CUSTOM_5f_6_5f_1">
        <draw:custom-shape draw:name="Google Shape;221;p27" draw:style-name="gr6" draw:text-style-name="P15" draw:layer="layout" svg:width="30.479cm" svg:height="1.779cm" svg:x="1.651cm" svg:y="3.382cm">
          <text:p text:style-name="P2"><text:span text:style-name="T9">Smart Widgets from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12" draw:text-style-name="P1" draw:layer="layout" svg:width="1.396cm" svg:height="1.396cm" svg:x="1.905cm" svg:y="6.557cm">
          <text:p text:style-name="P14"><text:span text:style-name="T2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3;p27" draw:style-name="gr6" draw:text-style-name="P15" draw:layer="layout" svg:width="27.939cm" svg:height="1.102cm" svg:x="3.81cm" svg:y="6.684cm">
          <text:p text:style-name="P2"><text:span text:style-name="T29">You type: <text:s/>qudt:M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6" draw:text-style-name="P15" draw:layer="layout" svg:width="1.015cm" svg:height="1.017cm" svg:x="2.21cm" svg:y="7.954cm">
          <text:p text:style-name="P14"><text:span text:style-name="T30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7" draw:style-name="gr12" draw:text-style-name="P1" draw:layer="layout" svg:width="1.396cm" svg:height="1.396cm" svg:x="1.905cm" svg:y="9.224cm">
          <text:p text:style-name="P14"><text:span text:style-name="T2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27" draw:style-name="gr6" draw:text-style-name="P15" draw:layer="layout" svg:width="27.939cm" svg:height="1.102cm" svg:x="3.81cm" svg:y="9.351cm">
          <text:p text:style-name="P2"><text:span text:style-name="T2">System queries QUDT ont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7" draw:style-name="gr6" draw:text-style-name="P15" draw:layer="layout" svg:width="1.015cm" svg:height="1.017cm" svg:x="2.21cm" svg:y="10.621cm">
          <text:p text:style-name="P14"><text:span text:style-name="T30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7" draw:style-name="gr12" draw:text-style-name="P1" draw:layer="layout" svg:width="1.396cm" svg:height="1.396cm" svg:x="1.905cm" svg:y="11.891cm">
          <text:p text:style-name="P14"><text:span text:style-name="T2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9;p27" draw:style-name="gr6" draw:text-style-name="P15" draw:layer="layout" svg:width="27.939cm" svg:height="1.102cm" svg:x="3.81cm" svg:y="12.018cm">
          <text:p text:style-name="P2"><text:span text:style-name="T2">Finds 6 applicable 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7" draw:style-name="gr6" draw:text-style-name="P15" draw:layer="layout" svg:width="1.015cm" svg:height="1.017cm" svg:x="2.21cm" svg:y="13.288cm">
          <text:p text:style-name="P14"><text:span text:style-name="T30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12" draw:text-style-name="P1" draw:layer="layout" svg:width="1.396cm" svg:height="1.396cm" svg:x="1.905cm" svg:y="14.558cm">
          <text:p text:style-name="P14"><text:span text:style-name="T28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27" draw:style-name="gr6" draw:text-style-name="P15" draw:layer="layout" svg:width="27.939cm" svg:height="1.102cm" svg:x="3.81cm" svg:y="14.685cm">
          <text:p text:style-name="P2"><text:span text:style-name="T31">Creates unit dropdown automatic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6" draw:text-style-name="P15" draw:layer="layout" svg:width="31.749cm" svg:height="0.975cm" svg:x="1.016cm" svg:y="16.256cm">
          <text:p text:style-name="P2"><text:span text:style-name="T20">Works for any physical quantity: temperature, pressure, energy, voltage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7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Enrichment Engine</text:span></text:p>
          </draw:text-box>
        </draw:frame>
        <draw:frame draw:name="Google Shape;235;p27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218;p8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8:notes" draw:style-name="gr3" draw:layer="layout" svg:width="12.7cm" svg:height="9.524cm" svg:x="3.176cm" svg:y="1.905cm" draw:page-number="9" presentation:class="page"/>
        </presentation:notes>
      </draw:page>
      <draw:page draw:name="Architecture" draw:style-name="dp1" draw:master-page-name="CUSTOM_5f_6_5f_1">
        <draw:custom-shape draw:name="Google Shape;240;p28" draw:style-name="gr6" draw:text-style-name="P15" draw:layer="layout" svg:width="30.479cm" svg:height="1.779cm" svg:x="1.689cm" svg:y="2.905cm">
          <text:p text:style-name="P2"><text:span text:style-name="T9">How It All Conn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8" draw:style-name="gr13" draw:text-style-name="P22" draw:layer="layout" svg:width="25.399cm" svg:height="1.597cm" svg:x="4.541cm" svg:y="5.191cm">
          <text:p text:style-name="P14"><text:span text:style-name="T32">Shared Ontologies <text:s text:c="4"/></text:span><text:span text:style-name="T33">QUDT · Schema.org · FOAF · SKOS <text:s/>(17 vocabulari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8" draw:style-name="gr14" draw:text-style-name="P22" draw:layer="layout" svg:width="25.399cm" svg:height="1.597cm" svg:x="4.541cm" svg:y="7.3cm">
          <text:p text:style-name="P14"><text:span text:style-name="T34">Brick Library <text:s text:c="8"/></text:span><text:span text:style-name="T33">Reusable building blocks (JS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8" draw:style-name="gr14" draw:text-style-name="P22" draw:layer="layout" svg:width="25.399cm" svg:height="1.597cm" svg:x="4.541cm" svg:y="9.409cm">
          <text:p text:style-name="P14"><text:span text:style-name="T34">Schema Composer <text:s text:c="6"/></text:span><text:span text:style-name="T33">Assemble bricks into product bluepr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8" draw:style-name="gr13" draw:text-style-name="P22" draw:layer="layout" svg:width="25.399cm" svg:height="1.597cm" svg:x="4.541cm" svg:y="11.518cm">
          <text:p text:style-name="P14"><text:span text:style-name="T32">SHACL Exporter <text:s text:c="7"/></text:span><text:span text:style-name="T33">Generates validation rules (Turt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8" draw:style-name="gr15" draw:text-style-name="P22" draw:layer="layout" svg:width="25.399cm" svg:height="1.597cm" svg:x="4.541cm" svg:y="13.627cm">
          <text:p text:style-name="P14"><text:span text:style-name="T35">Form Generator <text:s text:c="7"/></text:span><text:span text:style-name="T33">HTML interface the data-entry clerk se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8" draw:style-name="gr16" draw:text-style-name="P22" draw:layer="layout" svg:width="25.399cm" svg:height="1.597cm" svg:x="4.541cm" svg:y="15.736cm">
          <text:p text:style-name="P14"><text:span text:style-name="T36">Validated Data <text:s text:c="7"/></text:span><text:span text:style-name="T33">Ready for Digital Product Pas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28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Architecture</text:span></text:p>
          </draw:text-box>
        </draw:frame>
        <draw:frame draw:name="Google Shape;248;p28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237;p9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8;p9:notes" draw:style-name="gr3" draw:layer="layout" svg:width="12.7cm" svg:height="9.524cm" svg:x="3.176cm" svg:y="1.905cm" draw:page-number="10" presentation:class="page"/>
        </presentation:notes>
      </draw:page>
      <draw:page draw:name="Real-World Impact" draw:style-name="dp1" draw:master-page-name="CUSTOM_5f_6_5f_1">
        <draw:custom-shape draw:name="Google Shape;253;p29" draw:style-name="gr6" draw:text-style-name="P15" draw:layer="layout" svg:width="30.479cm" svg:height="1.779cm" svg:x="1.088cm" svg:y="2.998cm">
          <text:p text:style-name="P2"><text:span text:style-name="T9">Why This Mat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17" draw:text-style-name="P15" draw:layer="layout" svg:width="11.429cm" svg:height="1.452cm" svg:x="1.088cm" svg:y="6.1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9" draw:style-name="gr6" draw:text-style-name="P15" draw:layer="layout" svg:width="11.429cm" svg:height="1.398cm" svg:x="13.28cm" svg:y="6.173cm">
          <text:p text:style-name="P2"><text:span text:style-name="T37">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9" draw:style-name="gr6" draw:text-style-name="P15" draw:layer="layout" svg:width="11.429cm" svg:height="1.398cm" svg:x="23.694cm" svg:y="6.173cm">
          <text:p text:style-name="P2"><text:span text:style-name="T37">Af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9" draw:style-name="gr6" draw:text-style-name="P15" draw:layer="layout" svg:width="11.683cm" svg:height="1.355cm" svg:x="1.088cm" svg:y="7.443cm">
          <text:p text:style-name="P2"><text:span text:style-name="T38">Schema definition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9" draw:style-name="gr6" draw:text-style-name="P15" draw:layer="layout" svg:width="9.651cm" svg:height="1.355cm" svg:x="13.28cm" svg:y="7.443cm">
          <text:p text:style-name="P2"><text:span text:style-name="T39">3 mont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9" draw:style-name="gr6" draw:text-style-name="P15" draw:layer="layout" svg:width="9.651cm" svg:height="1.355cm" svg:x="23.694cm" svg:y="7.443cm">
          <text:p text:style-name="P2"><text:span text:style-name="T40">1 we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9" draw:style-name="gr6" draw:text-style-name="P15" draw:layer="layout" svg:width="11.683cm" svg:height="1.355cm" svg:x="1.088cm" svg:y="9.272cm">
          <text:p text:style-name="P2"><text:span text:style-name="T38">Unit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9" draw:style-name="gr6" draw:text-style-name="P15" draw:layer="layout" svg:width="9.651cm" svg:height="1.355cm" svg:x="13.28cm" svg:y="9.272cm">
          <text:p text:style-name="P2"><text:span text:style-name="T39">manual 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9" draw:style-name="gr6" draw:text-style-name="P15" draw:layer="layout" svg:width="9.651cm" svg:height="1.355cm" svg:x="23.694cm" svg:y="9.272cm">
          <text:p text:style-name="P2"><text:span text:style-name="T40">autom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9" draw:style-name="gr6" draw:text-style-name="P15" draw:layer="layout" svg:width="11.683cm" svg:height="1.355cm" svg:x="1.088cm" svg:y="11.1cm">
          <text:p text:style-name="P2"><text:span text:style-name="T38">Validation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9" draw:style-name="gr6" draw:text-style-name="P15" draw:layer="layout" svg:width="9.651cm" svg:height="1.355cm" svg:x="13.28cm" svg:y="11.1cm">
          <text:p text:style-name="P2"><text:span text:style-name="T39">50+ (found l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9" draw:style-name="gr6" draw:text-style-name="P15" draw:layer="layout" svg:width="9.651cm" svg:height="1.355cm" svg:x="23.694cm" svg:y="11.1cm">
          <text:p text:style-name="P2"><text:span text:style-name="T40">2 (caught earl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9" draw:style-name="gr6" draw:text-style-name="P15" draw:layer="layout" svg:width="11.683cm" svg:height="1.355cm" svg:x="1.088cm" svg:y="12.929cm">
          <text:p text:style-name="P2"><text:span text:style-name="T38">Consis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9" draw:style-name="gr6" draw:text-style-name="P15" draw:layer="layout" svg:width="9.651cm" svg:height="1.355cm" svg:x="13.28cm" svg:y="12.929cm">
          <text:p text:style-name="P2"><text:span text:style-name="T39">varies per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9" draw:style-name="gr6" draw:text-style-name="P15" draw:layer="layout" svg:width="9.651cm" svg:height="1.355cm" svg:x="23.694cm" svg:y="12.929cm">
          <text:p text:style-name="P2"><text:span text:style-name="T40">standardi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9" draw:style-name="gr6" draw:text-style-name="P15" draw:layer="layout" svg:width="11.683cm" svg:height="1.355cm" svg:x="1.088cm" svg:y="14.758cm">
          <text:p text:style-name="P2"><text:span text:style-name="T38">Non-technical auth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9" draw:style-name="gr6" draw:text-style-name="P15" draw:layer="layout" svg:width="9.651cm" svg:height="1.355cm" svg:x="13.28cm" svg:y="14.758cm">
          <text:p text:style-name="P2"><text:span text:style-name="T39">impos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9" draw:style-name="gr6" draw:text-style-name="P15" draw:layer="layout" svg:width="9.651cm" svg:height="1.355cm" svg:x="23.694cm" svg:y="14.758cm">
          <text:p text:style-name="P2"><text:span text:style-name="T40">point-and-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29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Real-World Impact</text:span></text:p>
          </draw:text-box>
        </draw:frame>
        <draw:frame draw:name="Google Shape;273;p29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250;p10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10:notes" draw:style-name="gr3" draw:layer="layout" svg:width="12.7cm" svg:height="9.524cm" svg:x="3.176cm" svg:y="1.905cm" draw:page-number="11" presentation:class="page"/>
        </presentation:notes>
      </draw:page>
      <draw:page draw:name="Key Takaways" draw:style-name="dp1" draw:master-page-name="CUSTOM_5f_6_5f_1">
        <draw:custom-shape draw:name="Google Shape;278;p30" draw:style-name="gr1" draw:text-style-name="P1" draw:layer="layout" svg:width="0.456cm" svg:height="19.049cm" svg:x="0cm" svg:y="0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6" draw:text-style-name="P15" draw:layer="layout" svg:width="8.127cm" svg:height="1.271cm" svg:x="1.27cm" svg:y="4.572cm">
          <text:p text:style-name="P2"><text:span text:style-name="T41">🧱 <text:s/></text:span><text:span text:style-name="T41">Bri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0" draw:style-name="gr6" draw:text-style-name="P15" draw:layer="layout" svg:width="22.859cm" svg:height="1.186cm" svg:x="9.652cm" svg:y="4.572cm">
          <text:p text:style-name="P2"><text:span text:style-name="T42">Reusable, semantic data components — define once, use every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0" draw:style-name="gr6" draw:text-style-name="P15" draw:layer="layout" svg:width="8.127cm" svg:height="1.271cm" svg:x="1.27cm" svg:y="6.909cm">
          <text:p text:style-name="P2"><text:span text:style-name="T41">🔗 <text:s/></text:span><text:span text:style-name="T41">SHA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0" draw:style-name="gr6" draw:text-style-name="P15" draw:layer="layout" svg:width="22.859cm" svg:height="1.186cm" svg:x="9.652cm" svg:y="6.909cm">
          <text:p text:style-name="P2"><text:span text:style-name="T42">Standardised validation rules — machines can check y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0" draw:style-name="gr6" draw:text-style-name="P15" draw:layer="layout" svg:width="8.127cm" svg:height="1.271cm" svg:x="1.27cm" svg:y="9.246cm">
          <text:p text:style-name="P2"><text:span text:style-name="T41">✨ <text:s/></text:span><text:span text:style-name="T41">Enrich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0" draw:style-name="gr6" draw:text-style-name="P15" draw:layer="layout" svg:width="22.859cm" svg:height="2.117cm" svg:x="9.652cm" svg:y="9.246cm">
          <text:p text:style-name="P2"><text:span text:style-name="T42">Ontology-driven smart widgets — unit dropdowns appear automatic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0" draw:style-name="gr6" draw:text-style-name="P15" draw:layer="layout" svg:width="8.127cm" svg:height="1.271cm" svg:x="1.27cm" svg:y="11.582cm">
          <text:p text:style-name="P2"><text:span text:style-name="T41">🎨 <text:s/></text:span><text:span text:style-name="T41">Fo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0" draw:style-name="gr6" draw:text-style-name="P15" draw:layer="layout" svg:width="22.859cm" svg:height="1.186cm" svg:x="9.652cm" svg:y="11.582cm">
          <text:p text:style-name="P2"><text:span text:style-name="T42">Automatic user interfaces — no coding needed for data en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0" draw:style-name="gr6" draw:text-style-name="P15" draw:layer="layout" svg:width="8.127cm" svg:height="1.271cm" svg:x="1.27cm" svg:y="13.919cm">
          <text:p text:style-name="P2"><text:span text:style-name="T41">♻️ <text:s/></text:span><text:span text:style-name="T41">Re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0" draw:style-name="gr6" draw:text-style-name="P15" draw:layer="layout" svg:width="22.859cm" svg:height="1.186cm" svg:x="9.652cm" svg:y="13.919cm">
          <text:p text:style-name="P2"><text:span text:style-name="T42">Change a brick once → every form using it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30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Key Takaways</text:span></text:p>
          </draw:text-box>
        </draw:frame>
        <draw:frame draw:name="Google Shape;290;p30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275;p11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6;p11:notes" draw:style-name="gr3" draw:layer="layout" svg:width="12.7cm" svg:height="9.524cm" svg:x="3.176cm" svg:y="1.905cm" draw:page-number="12" presentation:class="page"/>
        </presentation:notes>
      </draw:page>
      <draw:page draw:name="Getting Started" draw:style-name="dp3" draw:master-page-name="CUSTOM_5f_6_5f_1">
        <draw:frame draw:name="Google Shape;295;p31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Getting Started</text:span></text:p>
          </draw:text-box>
        </draw:frame>
        <draw:frame draw:name="Google Shape;296;p31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Google Shape;297;p31" draw:style-name="gr12" draw:text-style-name="P1" draw:layer="layout" svg:width="1.396cm" svg:height="1.396cm" svg:x="1.212cm" svg:y="6.705cm">
          <text:p text:style-name="P14"><text:span text:style-name="T4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8;p31" draw:style-name="gr6" draw:text-style-name="P15" draw:layer="layout" svg:width="5.082cm" svg:height="1.017cm" svg:x="3.117cm" svg:y="6.832cm">
          <text:p text:style-name="P2"><text:span text:style-name="T44">Down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1" draw:style-name="gr5" draw:text-style-name="P15" draw:layer="layout" svg:width="17.588cm" svg:height="1.525cm" svg:x="1.801cm" svg:y="3.158cm">
          <text:p text:style-name="P2"><text:span text:style-name="T8">One Download, One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1" draw:style-name="gr6" draw:text-style-name="P15" draw:layer="layout" svg:width="24.043cm" svg:height="1.017cm" svg:x="8.708cm" svg:y="6.848cm">
          <text:p text:style-name="P2"><text:span text:style-name="T45">Clone or download the repository from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1" draw:style-name="gr12" draw:text-style-name="P1" draw:layer="layout" svg:width="1.396cm" svg:height="1.396cm" svg:x="1.212cm" svg:y="9.055cm">
          <text:p text:style-name="P14"><text:span text:style-name="T4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2;p31" draw:style-name="gr6" draw:text-style-name="P15" draw:layer="layout" svg:width="5.082cm" svg:height="1.017cm" svg:x="3.117cm" svg:y="9.182cm">
          <text:p text:style-name="P2"><text:span text:style-name="T44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1" draw:style-name="gr6" draw:text-style-name="P15" draw:layer="layout" svg:width="24.043cm" svg:height="1.017cm" svg:x="8.708cm" svg:y="9.198cm">
          <text:p text:style-name="P2"><text:span text:style-name="T45">Clone or download the repository from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1" draw:style-name="gr12" draw:text-style-name="P1" draw:layer="layout" svg:width="1.396cm" svg:height="1.396cm" svg:x="1.106cm" svg:y="11.404cm">
          <text:p text:style-name="P14"><text:span text:style-name="T4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5;p31" draw:style-name="gr6" draw:text-style-name="P15" draw:layer="layout" svg:width="5.082cm" svg:height="1.017cm" svg:x="3.011cm" svg:y="11.531cm">
          <text:p text:style-name="P2"><text:span text:style-name="T44">Op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1" draw:style-name="gr6" draw:text-style-name="P15" draw:layer="layout" svg:width="24.043cm" svg:height="1.017cm" svg:x="8.602cm" svg:y="11.547cm">
          <text:p text:style-name="P2"><text:span text:style-name="T45">Clone or download the repository from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1" draw:style-name="gr12" draw:text-style-name="P1" draw:layer="layout" svg:width="1.396cm" svg:height="1.396cm" svg:x="1.106cm" svg:y="13.754cm">
          <text:p text:style-name="P14"><text:span text:style-name="T4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8;p31" draw:style-name="gr6" draw:text-style-name="P15" draw:layer="layout" svg:width="5.082cm" svg:height="1.017cm" svg:x="3.011cm" svg:y="13.881cm">
          <text:p text:style-name="P2"><text:span text:style-name="T44">Y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1" draw:style-name="gr6" draw:text-style-name="P15" draw:layer="layout" svg:width="24.043cm" svg:height="1.017cm" svg:x="8.602cm" svg:y="13.897cm">
          <text:p text:style-name="P2"><text:span text:style-name="T45">Clone or download the repository from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3ed852be8a7_0_282:notes" draw:style-name="gr3" draw:layer="layout" svg:width="12.7cm" svg:height="9.524cm" svg:x="3.176cm" svg:y="1.905cm" draw:page-number="13" presentation:class="page"/>
          <draw:frame draw:name="Google Shape;293;g3ed852be8a7_0_282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CUSTOM_5f_6_5f_1">
        <draw:custom-shape draw:name="Google Shape;314;p32" draw:style-name="gr18" draw:text-style-name="P23" draw:layer="layout" svg:width="0.456cm" svg:height="19.049cm" svg:x="0cm" svg:y="0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2" draw:style-name="gr6" draw:text-style-name="P15" draw:layer="layout" svg:width="30.987cm" svg:height="1.186cm" svg:x="1.435cm" svg:y="5.748cm">
          <text:p text:style-name="P2"><text:span text:style-name="T46">Q: Can non-programmers use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2" draw:style-name="gr6" draw:text-style-name="P15" draw:layer="layout" svg:width="30.987cm" svg:height="1.144cm" svg:x="1.435cm" svg:y="6.814cm">
          <text:p text:style-name="P2"><text:span text:style-name="T47">A: Yes — brick_app and schema_app are point-and-click web too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2" draw:style-name="gr6" draw:text-style-name="P15" draw:layer="layout" svg:width="30.987cm" svg:height="1.186cm" svg:x="1.435cm" svg:y="8.415cm">
          <text:p text:style-name="P2"><text:span text:style-name="T46">Q: What about our own vocabular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2" draw:style-name="gr6" draw:text-style-name="P15" draw:layer="layout" svg:width="30.987cm" svg:height="1.144cm" svg:x="1.435cm" svg:y="9.481cm">
          <text:p text:style-name="P2"><text:span text:style-name="T47">A: Load any RDF/OWL ontology — enrichment works with it automatical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2" draw:style-name="gr6" draw:text-style-name="P15" draw:layer="layout" svg:width="30.987cm" svg:height="1.186cm" svg:x="1.435cm" svg:y="11.082cm">
          <text:p text:style-name="P2"><text:span text:style-name="T46">Q: Does it connect to our databas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2" draw:style-name="gr6" draw:text-style-name="P15" draw:layer="layout" svg:width="30.987cm" svg:height="1.144cm" svg:x="1.435cm" svg:y="12.148cm">
          <text:p text:style-name="P2"><text:span text:style-name="T47">A: Exported SHACL validates data; can export to JSON/XML/RDF for any syst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32" presentation:style-name="pr10" draw:text-style-name="P18" draw:layer="layout" svg:width="24.494cm" svg:height="1.638cm" svg:x="1.154cm" svg:y="0.802cm" presentation:class="title" presentation:user-transformed="true">
          <draw:text-box>
            <text:p text:style-name="P4"><text:span text:style-name="T13">Questions?</text:span></text:p>
          </draw:text-box>
        </draw:frame>
        <draw:frame draw:name="Google Shape;322;p32" presentation:style-name="pr11" draw:text-style-name="P13" draw:layer="layout" svg:width="2.031cm" svg:height="1.457cm" svg:x="32.164cm" svg:y="17.77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frame draw:name="Google Shape;311;p12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2;p12:notes" draw:style-name="gr3" draw:layer="layout" svg:width="12.7cm" svg:height="9.524cm" svg:x="3.176cm" svg:y="1.905cm" draw:page-number="14" presentation:class="page"/>
        </presentation:notes>
      </draw:page>
      <draw:page draw:name="page15" draw:style-name="dp3" draw:master-page-name="Default">
        <draw:frame draw:name="Google Shape;327;p33" presentation:style-name="pr23" draw:text-style-name="P13" draw:layer="layout" svg:width="2.031cm" svg:height="1.457cm" svg:x="31.684cm" svg:y="17.592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frame draw:name="Google Shape;324;g3ee0ac838dd_0_66:notes" presentation:style-name="pr24" draw:text-style-name="P8" draw:layer="layout" svg:width="15.24cm" svg:height="10.001cm" svg:x="1.904cm" svg:y="12.223cm" presentation:class="notes" presentation:placeholder="true" presentation:user-transformed="true">
            <draw:text-box/>
          </draw:frame>
          <draw:page-thumbnail draw:name="Google Shape;325;g3ee0ac838dd_0_66:notes" draw:style-name="gr3" draw:layer="layout" svg:width="16.156cm" svg:height="8.572cm" svg:x="1.446cm" svg:y="3.17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urier New" svg:font-family="'Courier New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solid" draw:fill-color="#f2f2f2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2f2f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f2f2f2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shrink-to-fit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_5f_1-background" style:display-name="CUSTOM_6_1-background" style:family="presentation">
      <style:graphic-properties draw:stroke="none" draw:fill="solid" draw:fill-color="#f2f2f2"/>
      <style:text-properties style:letter-kerning="true"/>
    </style:style>
    <style:style style:name="CUSTOM_5f_6_5f_1-backgroundobjects" style:display-name="CUSTOM_6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_5f_1-notes" style:display-name="CUSTOM_6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_5f_1-outline1" style:display-name="CUSTOM_6_1-outline1" style:family="presentation">
      <style:graphic-properties draw:stroke="none" draw:fill="none" draw:auto-grow-height="false" draw:fit-to-size="shrink-to-fit" style:shrink-to-fit="true">
        <text:list-style style:name="CUSTOM_5f_6_5f_1-outline1" style:display-name="CUSTOM_6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_5f_1-outline2" style:display-name="CUSTOM_6_1-outline2" style:family="presentation" style:parent-style-name="CUSTOM_5f_6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1-outline3" style:display-name="CUSTOM_6_1-outline3" style:family="presentation" style:parent-style-name="CUSTOM_5f_6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1-outline4" style:display-name="CUSTOM_6_1-outline4" style:family="presentation" style:parent-style-name="CUSTOM_5f_6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1-outline5" style:display-name="CUSTOM_6_1-outline5" style:family="presentation" style:parent-style-name="CUSTOM_5f_6_5f_1-outline4">
      <style:paragraph-properties fo:margin-top="0.1cm" fo:margin-bottom="0cm"/>
      <style:text-properties fo:font-size="20pt" style:font-size-asian="20pt" style:font-size-complex="20pt"/>
    </style:style>
    <style:style style:name="CUSTOM_5f_6_5f_1-outline6" style:display-name="CUSTOM_6_1-outline6" style:family="presentation" style:parent-style-name="CUSTOM_5f_6_5f_1-outline5">
      <style:paragraph-properties fo:margin-top="0.1cm" fo:margin-bottom="0cm"/>
      <style:text-properties fo:font-size="20pt" style:font-size-asian="20pt" style:font-size-complex="20pt"/>
    </style:style>
    <style:style style:name="CUSTOM_5f_6_5f_1-outline7" style:display-name="CUSTOM_6_1-outline7" style:family="presentation" style:parent-style-name="CUSTOM_5f_6_5f_1-outline6">
      <style:paragraph-properties fo:margin-top="0.1cm" fo:margin-bottom="0cm"/>
      <style:text-properties fo:font-size="20pt" style:font-size-asian="20pt" style:font-size-complex="20pt"/>
    </style:style>
    <style:style style:name="CUSTOM_5f_6_5f_1-outline8" style:display-name="CUSTOM_6_1-outline8" style:family="presentation" style:parent-style-name="CUSTOM_5f_6_5f_1-outline7">
      <style:paragraph-properties fo:margin-top="0.1cm" fo:margin-bottom="0cm"/>
      <style:text-properties fo:font-size="20pt" style:font-size-asian="20pt" style:font-size-complex="20pt"/>
    </style:style>
    <style:style style:name="CUSTOM_5f_6_5f_1-outline9" style:display-name="CUSTOM_6_1-outline9" style:family="presentation" style:parent-style-name="CUSTOM_5f_6_5f_1-outline8">
      <style:paragraph-properties fo:margin-top="0.1cm" fo:margin-bottom="0cm"/>
      <style:text-properties fo:font-size="20pt" style:font-size-asian="20pt" style:font-size-complex="20pt"/>
    </style:style>
    <style:style style:name="CUSTOM_5f_6_5f_1-subtitle" style:display-name="CUSTOM_6_1-subtitle" style:family="presentation">
      <style:graphic-properties draw:stroke="none" draw:fill="none" draw:textarea-vertical-align="middle">
        <text:list-style style:name="CUSTOM_5f_6_5f_1-subtitle" style:display-name="CUSTOM_6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_5f_1-title" style:display-name="CUSTOM_6_1-title" style:family="presentation">
      <style:graphic-properties draw:stroke="none" draw:fill="none" draw:textarea-vertical-align="middle">
        <text:list-style style:name="CUSTOM_5f_6_5f_1-title" style:display-name="CUSTOM_6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35cm" svg:stroke-color="#f1c232" draw:stroke-linejoin="round" draw:fill="none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7cm" fo:padding-bottom="0.167cm" fo:padding-left="0.333cm" fo:padding-right="0.333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1cm" fo:padding-bottom="0.131cm" fo:padding-left="0.262cm" fo:padding-right="0.262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31cm" fo:padding-bottom="0.131cm" fo:padding-left="0.262cm" fo:padding-right="0.262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USTOM_5f_7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2" style:family="presentation" style:parent-style-name="CUSTOM_5f_7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_5f_7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6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8" style:family="presentation" style:parent-style-name="CUSTOM_5f_6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6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_5f_6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11" style:family="presentation" style:parent-style-name="CUSTOM_5f_6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6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7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a5a5a5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4b8c33" style:text-line-through-style="none" style:text-line-through-type="none" style:text-position="0% 100%" style:font-name="Arial Black" fo:font-size="33.5999984741211pt" fo:letter-spacing="normal" fo:font-style="normal" style:text-underline-style="none" fo:font-weight="bold" style:font-name-asian="Arial Black" style:font-size-asian="33.5999984741211pt" style:font-style-asian="normal" style:font-weight-asian="bold" style:font-name-complex="Arial Black" style:font-size-complex="33.5999984741211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3.5999984741211pt" fo:letter-spacing="normal" fo:font-style="normal" style:text-underline-style="none" fo:font-weight="normal" style:font-name-asian="Arial" style:font-size-asian="33.5999984741211pt" style:font-style-asian="normal" style:font-weight-asian="normal" style:font-name-complex="Arial" style:font-size-complex="33.599998474121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a02b93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7" style:family="text">
      <style:text-properties fo:font-variant="normal" fo:text-transform="none" fo:color="#4b8c33" style:text-line-through-style="none" style:text-line-through-type="none" style:text-position="0% 100%" style:font-name="Open Sans" fo:font-size="15.3999996185303pt" fo:letter-spacing="normal" fo:font-style="normal" style:text-underline-style="none" fo:font-weight="bold" style:font-name-asian="Open Sans" style:font-size-asian="15.3999996185303pt" style:font-style-asian="normal" style:font-weight-asian="bold" style:font-name-complex="Open Sans" style:font-size-complex="15.3999996185303pt" style:font-style-complex="normal" style:font-weight-complex="bold"/>
    </style:style>
    <style:style style:name="MT8" style:family="text">
      <style:text-properties fo:font-variant="normal" fo:text-transform="none" fo:color="#4b8c33" style:text-line-through-style="none" style:text-line-through-type="none" style:text-position="0% 100%" style:font-name="Arial Black" fo:font-size="63pt" fo:letter-spacing="normal" fo:font-style="normal" style:text-underline-style="none" fo:font-weight="bold" style:font-name-asian="Arial Black" style:font-size-asian="63pt" style:font-style-asian="normal" style:font-weight-asian="bold" style:font-name-complex="Arial Black" style:font-size-complex="63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1" style:family="text">
      <style:text-properties fo:font-variant="normal" fo:text-transform="none" fo:color="#4b8c33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MT12" style:family="text">
      <style:text-properties fo:font-variant="normal" fo:text-transform="none" fo:color="#a02b93" style:text-line-through-style="none" style:text-line-through-type="none" style:text-position="0% 100%" style:font-name="Open Sans" fo:font-size="19pt" fo:letter-spacing="normal" fo:font-style="normal" style:text-underline-style="none" fo:font-weight="bold" style:font-name-asian="Open Sans" style:font-size-asian="19pt" style:font-style-asian="normal" style:font-weight-asian="bold" style:font-name-complex="Open Sans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5f_7" style:display-name="CUSTOM_7" style:page-layout-name="PM1" draw:style-name="Mdp1">
      <draw:custom-shape draw:name="Google Shape;6;p1" draw:style-name="Mgr3" draw:text-style-name="MP5" draw:layer="backgroundobjects" svg:width="30.793cm" svg:height="19.049cm" svg:x="3.059cm" svg:y="0cm">
        <text:p/>
        <draw:enhanced-geometry draw:mirror-horizontal="false" draw:mirror-vertical="false" drawooo:sub-view-size="10078116 6858000" draw:text-areas="0 0 ?f0 ?f1" svg:viewBox="0 0 0 0" draw:type="ooxml-non-primitive" draw:enhanced-path="M 3793236 6858000 L 0 0 10078116 0 10078116 6858000 Z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.044cm" svg:height="1.017cm" svg:x="32.657cm" svg:y="17.977cm">
        <text:p text:style-name="MP16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;p1" draw:style-name="Mgr5" draw:text-style-name="MP6" draw:layer="backgroundobjects" svg:width="21.918cm" svg:height="0.898cm" svg:x="1.298cm" svg:y="18.036cm">
        <text:p text:style-name="MP7"><text:span text:style-name="MT1">AI3D -- Thessaloniki, Gree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draw:style-name="Mgr6" draw:text-style-name="MP8" draw:layer="backgroundobjects" svg:width="12.372cm" svg:height="11.733cm" svg:x="1.716cm" svg:y="3.032cm">
        <draw:image xlink:href="Pictures/1000020100000800000007C3040A0968B22380C5.png" xlink:type="simple" xlink:show="embed" xlink:actuate="onLoad">
          <text:p/>
        </draw:image>
      </draw:frame>
      <draw:custom-shape draw:name="Google Shape;18;p3" draw:style-name="Mgr7" draw:text-style-name="MP6" draw:layer="backgroundobjects" svg:width="17.756cm" svg:height="3.033cm" svg:x="15.145cm" svg:y="5.02cm">
        <text:p text:style-name="MP9"><text:span text:style-name="MT2">Know Your Products!</text:span><text:span text:style-name="MT3"><text:line-break/></text:span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3" draw:style-name="Mgr7" draw:text-style-name="MP6" draw:layer="backgroundobjects" svg:width="24.6cm" svg:height="0.842cm" svg:x="6.76cm" svg:y="17.775cm">
        <text:p text:style-name="MP9"><text:span text:style-name="MT4">DigiPass</text:span><text:span text:style-name="MT5"> CSA project has been funded by the European Commission for the programme HORIZON-CL4-2023-RESILIENCE-01, Grant Agreement No </text:span><text:span text:style-name="MT4">101138510</text:span></text:p>
        <text:p text:style-name="MP9"><text:span text:style-name="MT5">WIKKI LIMITED, UK participant in Horizon Europe Project DigiPass, is supported by UKRI grant number 10100819: </text:span><text:span text:style-name="MT4">DigiPas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draw:style-name="Mgr6" draw:text-style-name="MP8" draw:layer="backgroundobjects" svg:width="1.959cm" svg:height="1.267cm" svg:x="31.364cm" svg:y="17.297cm">
        <draw:image xlink:href="Pictures/10000000000000AD00000073D3F11BE981A910BB.jpg" xlink:type="simple" xlink:show="embed" xlink:actuate="onLoad">
          <text:p/>
        </draw:image>
      </draw:frame>
      <draw:custom-shape draw:name="Google Shape;21;p3" draw:style-name="Mgr8" draw:text-style-name="MP6" draw:layer="backgroundobjects" svg:width="13.262cm" svg:height="0.389cm" svg:x="18.099cm" svg:y="17.5cm">
        <text:p text:style-name="MP10"><text:span text:style-name="MT6">COORDINATION AND KNOWLEDGE SHARING ACROSS MATERIALS DEVELOPMENT COMMUNITIES (CSA)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1" draw:layer="backgroundobjects" svg:width="12.372cm" svg:height="0.693cm" svg:x="0.834cm" svg:y="18.094cm">
        <text:p text:style-name="MP10"><text:span text:style-name="MT7">Know Your Products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7" draw:text-style-name="MP6" draw:layer="backgroundobjects" svg:width="17.756cm" svg:height="2.859cm" svg:x="15.145cm" svg:y="2.461cm">
        <text:p text:style-name="MP9"><text:span text:style-name="MT8">DigiPas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3" presentation:style-name="CUSTOM_5f_7-title" draw:layer="backgroundobjects" svg:width="31.587cm" svg:height="2.504cm" svg:x="1.031cm" svg:y="8.273cm" presentation:class="title" presentation:placeholder="true" presentation:user-transformed="true">
        <draw:text-box/>
      </draw:frame>
      <draw:frame draw:name="Google Shape;25;p3" presentation:style-name="Mpr1" draw:text-style-name="MP13" draw:layer="backgroundobjects" svg:width="2.031cm" svg:height="1.457cm" svg:x="31.684cm" svg:y="17.592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draw:frame presentation:style-name="CUSTOM_5f_7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9.798cm" svg:height="11.136cm" svg:x="0.6cm" svg:y="2.257cm" presentation:class="page"/>
        <draw:frame presentation:style-name="CUSTOM_5f_7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;p1" draw:style-name="Mgr3" draw:text-style-name="MP5" draw:layer="backgroundobjects" svg:width="30.793cm" svg:height="19.049cm" svg:x="3.059cm" svg:y="0cm">
        <text:p/>
        <draw:enhanced-geometry draw:mirror-horizontal="false" draw:mirror-vertical="false" drawooo:sub-view-size="10078116 6858000" draw:text-areas="0 0 ?f0 ?f1" svg:viewBox="0 0 0 0" draw:type="ooxml-non-primitive" draw:enhanced-path="M 3793236 6858000 L 0 0 10078116 0 10078116 6858000 Z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.044cm" svg:height="1.017cm" svg:x="32.657cm" svg:y="17.977cm">
        <text:p text:style-name="MP16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;p1" draw:style-name="Mgr5" draw:text-style-name="MP6" draw:layer="backgroundobjects" svg:width="21.918cm" svg:height="0.898cm" svg:x="1.298cm" svg:y="18.036cm">
        <text:p text:style-name="MP7"><text:span text:style-name="MT1">AI3D -- Thessaloniki, Gree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9" presentation:style-name="Mpr4" draw:text-style-name="MP15" draw:layer="backgroundobjects" svg:width="2.031cm" svg:height="1.457cm" svg:x="32.164cm" svg:y="17.757cm" presentation:class="page-number" presentation:user-transformed="true">
        <draw:text-box>
          <text:p text:style-name="MP14"><text:span text:style-name="MT10"><text:page-number>&lt;number&gt;</text:page-number></text:span></text:p>
        </draw:text-box>
      </draw:frame>
      <draw:frame draw:name="Google Shape;71;p9" presentation:style-name="BLANK-title" draw:layer="backgroundobjects" svg:width="25.104cm" svg:height="6.963cm" svg:x="4.377cm" svg:y="6.043cm" presentation:class="title" presentation:placeholder="true" presentation:user-transformed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28cm" svg:height="9.524cm" svg:x="1.06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6;p1" draw:style-name="Mgr3" draw:text-style-name="MP5" draw:layer="backgroundobjects" svg:width="30.793cm" svg:height="19.049cm" svg:x="3.059cm" svg:y="0cm">
        <text:p/>
        <draw:enhanced-geometry draw:mirror-horizontal="false" draw:mirror-vertical="false" drawooo:sub-view-size="10078116 6858000" draw:text-areas="0 0 ?f0 ?f1" svg:viewBox="0 0 0 0" draw:type="ooxml-non-primitive" draw:enhanced-path="M 3793236 6858000 L 0 0 10078116 0 10078116 6858000 Z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.044cm" svg:height="1.017cm" svg:x="32.657cm" svg:y="17.977cm">
        <text:p text:style-name="MP16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;p1" draw:style-name="Mgr5" draw:text-style-name="MP6" draw:layer="backgroundobjects" svg:width="21.918cm" svg:height="0.898cm" svg:x="1.298cm" svg:y="18.036cm">
        <text:p text:style-name="MP7"><text:span text:style-name="MT1">AI3D -- Thessaloniki, Gree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5" draw:style-name="Mgr6" draw:text-style-name="MP8" draw:layer="backgroundobjects" svg:width="33.789cm" svg:height="0.412cm" svg:x="0cm" svg:y="2.485cm">
        <draw:image xlink:href="Pictures/10000201000008000000001964EFD5A4EC2115B9.png" xlink:type="simple" xlink:show="embed" xlink:actuate="onLoad">
          <text:p/>
        </draw:image>
      </draw:frame>
      <draw:frame draw:name="Google Shape;32;p5" presentation:style-name="CUSTOM_5f_6-title" draw:layer="backgroundobjects" svg:width="24.494cm" svg:height="1.638cm" svg:x="1.154cm" svg:y="0.802cm" presentation:class="title" presentation:placeholder="true" presentation:user-transformed="true">
        <draw:text-box/>
      </draw:frame>
      <draw:frame draw:name="Google Shape;33;p5" presentation:style-name="CUSTOM_5f_6-outline1" draw:layer="backgroundobjects" svg:width="31.549cm" svg:height="13.595cm" svg:x="1.154cm" svg:y="3.326cm" presentation:class="outline" presentation:placeholder="true" presentation:user-transformed="true">
        <draw:text-box/>
      </draw:frame>
      <draw:frame draw:name="Google Shape;34;p5" draw:style-name="Mgr6" draw:text-style-name="MP8" draw:layer="backgroundobjects" svg:width="33.789cm" svg:height="0.412cm" svg:x="0cm" svg:y="17.717cm">
        <draw:image xlink:href="Pictures/10000201000008000000001964EFD5A4EC2115B9.png" xlink:type="simple" xlink:show="embed" xlink:actuate="onLoad">
          <text:p/>
        </draw:image>
      </draw:frame>
      <draw:frame draw:name="Google Shape;35;p5" draw:style-name="Mgr6" draw:text-style-name="MP8" draw:layer="backgroundobjects" svg:width="33.789cm" svg:height="0.412cm" svg:x="0.034cm" svg:y="0.344cm">
        <draw:image xlink:href="Pictures/10000201000008000000001964EFD5A4EC2115B9.png" xlink:type="simple" xlink:show="embed" xlink:actuate="onLoad">
          <text:p/>
        </draw:image>
      </draw:frame>
      <draw:frame draw:name="Google Shape;36;p5" presentation:style-name="Mpr7" draw:text-style-name="MP15" draw:layer="backgroundobjects" svg:width="2.031cm" svg:height="1.457cm" svg:x="32.164cm" svg:y="17.777cm" presentation:class="page-number" presentation:user-transformed="true">
        <draw:text-box>
          <text:p text:style-name="MP14"><text:span text:style-name="MT10"><text:page-number>&lt;number&gt;</text:page-number></text:span></text:p>
        </draw:text-box>
      </draw:frame>
      <draw:frame draw:name="Google Shape;37;p5" draw:style-name="Mgr10" draw:text-style-name="MP8" draw:layer="backgroundobjects" svg:width="2.031cm" svg:height="1.97cm" svg:x="31.185cm" svg:y="0.62cm">
        <draw:image xlink:href="Pictures/1000020100000800000007C3CEA84849522B5B71.png" xlink:type="simple" xlink:show="embed" xlink:actuate="onLoad">
          <text:p/>
        </draw:image>
      </draw:frame>
      <presentation:notes style:page-layout-name="PM2">
        <draw:page-thumbnail presentation:style-name="CUSTOM_5f_6-title" draw:layer="backgroundobjects" svg:width="16.928cm" svg:height="9.524cm" svg:x="1.06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6_5f_1" style:display-name="CUSTOM_6_1" style:page-layout-name="PM1" draw:style-name="Mdp1">
      <draw:custom-shape draw:name="Google Shape;6;p1" draw:style-name="Mgr3" draw:text-style-name="MP5" draw:layer="backgroundobjects" svg:width="30.793cm" svg:height="19.049cm" svg:x="3.059cm" svg:y="0cm">
        <text:p/>
        <draw:enhanced-geometry draw:mirror-horizontal="false" draw:mirror-vertical="false" drawooo:sub-view-size="10078116 6858000" draw:text-areas="0 0 ?f0 ?f1" svg:viewBox="0 0 0 0" draw:type="ooxml-non-primitive" draw:enhanced-path="M 3793236 6858000 L 0 0 10078116 0 10078116 6858000 Z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.044cm" svg:height="1.017cm" svg:x="32.657cm" svg:y="17.977cm">
        <text:p text:style-name="MP16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;p1" draw:style-name="Mgr5" draw:text-style-name="MP6" draw:layer="backgroundobjects" svg:width="21.918cm" svg:height="0.898cm" svg:x="1.298cm" svg:y="18.036cm">
        <text:p text:style-name="MP7"><text:span text:style-name="MT1">AI3D -- Thessaloniki, Gree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6" draw:style-name="Mgr6" draw:text-style-name="MP8" draw:layer="backgroundobjects" svg:width="33.789cm" svg:height="0.412cm" svg:x="0cm" svg:y="2.485cm">
        <draw:image xlink:href="Pictures/10000201000008000000001964EFD5A4EC2115B9.png" xlink:type="simple" xlink:show="embed" xlink:actuate="onLoad">
          <text:p/>
        </draw:image>
      </draw:frame>
      <draw:frame draw:name="Google Shape;40;p6" presentation:style-name="CUSTOM_5f_6_5f_1-title" draw:layer="backgroundobjects" svg:width="24.494cm" svg:height="1.638cm" svg:x="1.154cm" svg:y="0.802cm" presentation:class="title" presentation:placeholder="true" presentation:user-transformed="true">
        <draw:text-box/>
      </draw:frame>
      <draw:frame draw:name="Google Shape;41;p6" draw:style-name="Mgr6" draw:text-style-name="MP8" draw:layer="backgroundobjects" svg:width="33.789cm" svg:height="0.412cm" svg:x="0cm" svg:y="17.717cm">
        <draw:image xlink:href="Pictures/10000201000008000000001964EFD5A4EC2115B9.png" xlink:type="simple" xlink:show="embed" xlink:actuate="onLoad">
          <text:p/>
        </draw:image>
      </draw:frame>
      <draw:frame draw:name="Google Shape;42;p6" draw:style-name="Mgr6" draw:text-style-name="MP8" draw:layer="backgroundobjects" svg:width="33.789cm" svg:height="0.412cm" svg:x="0.034cm" svg:y="0.344cm">
        <draw:image xlink:href="Pictures/10000201000008000000001964EFD5A4EC2115B9.png" xlink:type="simple" xlink:show="embed" xlink:actuate="onLoad">
          <text:p/>
        </draw:image>
      </draw:frame>
      <draw:frame draw:name="Google Shape;43;p6" presentation:style-name="Mpr10" draw:text-style-name="MP15" draw:layer="backgroundobjects" svg:width="2.031cm" svg:height="1.457cm" svg:x="32.164cm" svg:y="17.777cm" presentation:class="page-number" presentation:user-transformed="true">
        <draw:text-box>
          <text:p text:style-name="MP14"><text:span text:style-name="MT10"><text:page-number>&lt;number&gt;</text:page-number></text:span></text:p>
        </draw:text-box>
      </draw:frame>
      <draw:frame draw:name="Google Shape;44;p6" draw:style-name="Mgr10" draw:text-style-name="MP8" draw:layer="backgroundobjects" svg:width="2.031cm" svg:height="1.97cm" svg:x="31.185cm" svg:y="0.62cm">
        <draw:image xlink:href="Pictures/1000020100000800000007C3CEA84849522B5B71.png" xlink:type="simple" xlink:show="embed" xlink:actuate="onLoad">
          <text:p/>
        </draw:image>
      </draw:frame>
      <draw:frame presentation:style-name="CUSTOM_5f_6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CUSTOM_5f_6_5f_1-title" draw:layer="backgroundobjects" svg:width="16.928cm" svg:height="9.524cm" svg:x="1.06cm" svg:y="1.93cm" presentation:class="page"/>
        <draw:frame presentation:style-name="CUSTOM_5f_6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Google Shape;100;p17" draw:style-name="Mgr6" draw:text-style-name="MP8" draw:layer="backgroundobjects" svg:width="3.163cm" svg:height="1.197cm" svg:x="0.383cm" svg:y="17.47cm">
        <draw:image xlink:href="Pictures/100002010000064400000260E06921D993B07D34.png" xlink:type="simple" xlink:show="embed" xlink:actuate="onLoad">
          <text:p/>
        </draw:image>
      </draw:frame>
      <draw:custom-shape draw:name="Google Shape;101;p17" draw:style-name="Mgr11" draw:text-style-name="MP6" draw:layer="backgroundobjects" svg:width="5.019cm" svg:height="0.455cm" svg:x="1.443cm" svg:y="18.239cm">
        <text:p text:style-name="MP10"><text:span text:style-name="MT11">Know Your Products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2;p17">
        <draw:frame draw:name="Google Shape;103;p17" draw:style-name="Mgr6" draw:text-style-name="MP8" draw:layer="layout" svg:width="4.417cm" svg:height="3.464cm" svg:x="15.602cm" svg:y="3.845cm">
          <draw:image xlink:href="Pictures/1000000000000108000000CF40EBC1BA1A4390A6.jpg" xlink:type="simple" xlink:show="embed" xlink:actuate="onLoad">
            <text:p/>
          </draw:image>
        </draw:frame>
        <draw:frame draw:name="Google Shape;104;p17" draw:style-name="Mgr6" draw:text-style-name="MP8" draw:layer="layout" svg:width="6.848cm" svg:height="1.705cm" svg:x="26.213cm" svg:y="4.513cm">
          <draw:image xlink:href="Pictures/10000201000001990000006668F2069BF5745EE2.png" xlink:type="simple" xlink:show="embed" xlink:actuate="onLoad">
            <text:p/>
          </draw:image>
        </draw:frame>
        <draw:frame draw:name="Google Shape;105;p17" draw:style-name="Mgr6" draw:text-style-name="MP8" draw:layer="layout" svg:width="4.447cm" svg:height="0.851cm" svg:x="16.645cm" svg:y="12.269cm">
          <draw:image xlink:href="Pictures/10000201000006910000013FE11B979C2D5E5ABC.png" xlink:type="simple" xlink:show="embed" xlink:actuate="onLoad">
            <text:p/>
          </draw:image>
        </draw:frame>
        <draw:frame draw:name="Google Shape;106;p17" draw:style-name="Mgr6" draw:text-style-name="MP8" draw:layer="layout" svg:width="7.586cm" svg:height="2.396cm" svg:x="20.015cm" svg:y="7.005cm">
          <draw:image xlink:href="Pictures/100000000000018F0000007EB256D04E04D8F09D.png" xlink:type="simple" xlink:show="embed" xlink:actuate="onLoad">
            <text:p/>
          </draw:image>
        </draw:frame>
        <draw:frame draw:name="Google Shape;107;p17" draw:style-name="Mgr6" draw:text-style-name="MP8" draw:layer="layout" svg:width="4.061cm" svg:height="0.991cm" svg:x="28.222cm" svg:y="7.21cm">
          <draw:image xlink:href="Pictures/100000000000008F00000023D79789B318A70763.png" xlink:type="simple" xlink:show="embed" xlink:actuate="onLoad">
            <text:p/>
          </draw:image>
        </draw:frame>
        <draw:frame draw:name="Google Shape;108;p17" draw:style-name="Mgr6" draw:text-style-name="MP8" draw:layer="layout" svg:width="2.628cm" svg:height="2.086cm" svg:x="16.819cm" svg:y="8.52cm">
          <draw:image xlink:href="Pictures/100002010000009D0000007D7E6E13E4A7C98284.png" xlink:type="simple" xlink:show="embed" xlink:actuate="onLoad">
            <text:p/>
          </draw:image>
        </draw:frame>
        <draw:frame draw:name="Google Shape;109;p17" draw:style-name="Mgr6" draw:text-style-name="MP8" draw:layer="layout" svg:width="4.493cm" svg:height="1.433cm" svg:x="28.182cm" svg:y="9.6cm">
          <draw:image xlink:href="Pictures/100000000000010D0000005644B16388C6F3C66B.jpg" xlink:type="simple" xlink:show="embed" xlink:actuate="onLoad">
            <text:p/>
          </draw:image>
        </draw:frame>
        <draw:frame draw:name="Google Shape;110;p17" draw:style-name="Mgr6" draw:text-style-name="MP8" draw:layer="layout" svg:width="3.961cm" svg:height="1.668cm" svg:x="21.835cm" svg:y="10.051cm">
          <draw:image xlink:href="Pictures/10000201000000400000001B9B35D45F292993A9.png" xlink:type="simple" xlink:show="embed" xlink:actuate="onLoad">
            <text:p/>
          </draw:image>
        </draw:frame>
        <draw:frame draw:name="Google Shape;111;p17" draw:style-name="Mgr6" draw:text-style-name="MP8" draw:layer="layout" svg:width="3.073cm" svg:height="1.558cm" svg:x="21.835cm" svg:y="4.799cm">
          <draw:image xlink:href="Pictures/10000000000000B80000005DDE40C9AD1F0ED538.png" xlink:type="simple" xlink:show="embed" xlink:actuate="onLoad">
            <text:p/>
          </draw:image>
        </draw:frame>
        <draw:frame draw:name="Google Shape;112;p17" draw:style-name="Mgr6" draw:text-style-name="MP8" draw:layer="layout" svg:width="4.641cm" svg:height="1.321cm" svg:x="22.365cm" svg:y="13.401cm">
          <draw:image xlink:href="Pictures/10000201000000F2000000459136B3911476AD7E.png" xlink:type="simple" xlink:show="embed" xlink:actuate="onLoad">
            <text:p/>
          </draw:image>
        </draw:frame>
        <draw:frame draw:name="Google Shape;113;p17" draw:style-name="Mgr6" draw:text-style-name="MP8" draw:layer="layout" svg:width="5.265cm" svg:height="1.712cm" svg:x="27.62cm" svg:y="11.78cm">
          <draw:image xlink:href="Pictures/100002010000013B00000066C433172FB63FACE4.png" xlink:type="simple" xlink:show="embed" xlink:actuate="onLoad">
            <text:p/>
          </draw:image>
        </draw:frame>
        <draw:frame draw:name="Google Shape;114;p17" draw:style-name="Mgr6" draw:text-style-name="MP8" draw:layer="layout" svg:width="2.017cm" svg:height="2.017cm" svg:x="18.168cm" svg:y="13.836cm">
          <draw:image xlink:href="Pictures/100002010000007A0000007AA68FDC3691569C49.png" xlink:type="simple" xlink:show="embed" xlink:actuate="onLoad">
            <text:p/>
          </draw:image>
        </draw:frame>
      </draw:g>
      <draw:g draw:name="Google Shape;115;p17">
        <draw:frame draw:name="Google Shape;116;p17" draw:style-name="Mgr6" draw:text-style-name="MP8" draw:layer="layout" svg:width="11.017cm" svg:height="10.691cm" draw:transform="rotate (-3.14159265358979) translate (13.817cm 13.844cm)">
          <draw:image xlink:href="Pictures/1000020100000800000007C3040A0968B22380C5.png" xlink:type="simple" xlink:show="embed" xlink:actuate="onLoad">
            <text:p/>
          </draw:image>
        </draw:frame>
        <draw:custom-shape draw:name="Google Shape;117;p17" draw:style-name="Mgr12" draw:text-style-name="MP6" draw:layer="layout" svg:width="7.725cm" svg:height="1.01cm" svg:x="4.413cm" svg:y="14.059cm">
          <text:p text:style-name="MP16"><text:span text:style-name="MT12">Know Your Produc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18;p17" draw:style-name="Mgr12" draw:text-style-name="MP6" draw:layer="backgroundobjects" svg:width="23.443cm" svg:height="0.822cm" svg:x="7.749cm" svg:y="17.733cm">
        <text:p text:style-name="MP9"><text:span text:style-name="MT4">DigiPass</text:span><text:span text:style-name="MT5"> CSA project has been funded by the European Commission for the programme HORIZON-CL4-2023-RESILIENCE-01, Grant Agreement No </text:span><text:span text:style-name="MT4">101138510</text:span></text:p>
        <text:p text:style-name="MP9"><text:span text:style-name="MT5">WIKKI LIMITED, UK participant in Horizon Europe Project DigiPass, is supported by UKRI grant number 10100819: </text:span><text:span text:style-name="MT4">DigiPas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9;p17" draw:style-name="Mgr6" draw:text-style-name="MP8" draw:layer="backgroundobjects" svg:width="1.867cm" svg:height="1.235cm" svg:x="31.195cm" svg:y="17.266cm">
        <draw:image xlink:href="Pictures/10000000000000AD00000073D3F11BE981A910BB.jpg" xlink:type="simple" xlink:show="embed" xlink:actuate="onLoad">
          <text:p/>
        </draw:image>
      </draw:frame>
      <draw:custom-shape draw:name="Google Shape;120;p17" draw:style-name="Mgr8" draw:text-style-name="MP6" draw:layer="backgroundobjects" svg:width="12.638cm" svg:height="0.38cm" svg:x="18.554cm" svg:y="17.464cm">
        <text:p text:style-name="MP10"><text:span text:style-name="MT6">COORDINATION AND KNOWLEDGE SHARING ACROSS MATERIALS DEVELOPMENT COMMUNITIES (CSA)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5;p18" presentation:style-name="Mpr13" draw:text-style-name="MP15" draw:layer="backgroundobjects" svg:width="2.031cm" svg:height="1.457cm" svg:x="31.684cm" svg:y="17.592cm" presentation:class="page-number" presentation:user-transformed="true">
        <draw:text-box>
          <text:p text:style-name="MP12"><text:span text:style-name="MT10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28cm" svg:height="9.524cm" svg:x="1.0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3"/>
    <meta:generator>LibreOfficeDev/6.0.5.2$Linux_X86_64 LibreOffice_project/</meta:generator>
  </office:meta>
</office:document-meta>
</file>